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paragraph-properties fo:text-indent="0.5in"/>
      <style:text-properties fo:language="en" fo:country="US"/>
    </style:style>
    <style:style style:name="P5" style:parent-style-name="Normal" style:family="paragraph">
      <style:paragraph-properties fo:text-indent="0.5in"/>
      <style:text-properties fo:language="en" fo:country="US"/>
    </style:style>
    <style:style style:name="P6" style:parent-style-name="Normal" style:family="paragraph">
      <style:paragraph-properties fo:text-indent="0.5in"/>
      <style:text-properties fo:language="en" fo:country="US"/>
    </style:style>
    <style:style style:name="P7" style:parent-style-name="NoSpacing" style:family="paragraph">
      <style:text-properties fo:language="en" fo:country="US"/>
    </style:style>
    <style:style style:name="P8" style:parent-style-name="NoSpacing" style:family="paragraph">
      <style:paragraph-properties fo:margin-left="0.5in" fo:text-indent="0.5in">
        <style:tab-stops/>
      </style:paragraph-properties>
    </style:style>
    <style:style style:name="P9" style:parent-style-name="NoSpacing" style:family="paragraph">
      <style:paragraph-properties fo:margin-left="0.5in" fo:text-indent="0.5in">
        <style:tab-stops/>
      </style:paragraph-properties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P12" style:parent-style-name="NoSpacing" style:family="paragraph">
      <style:text-properties fo:language="en" fo:country="US"/>
    </style:style>
    <style:style style:name="P13" style:parent-style-name="NoSpacing" style:list-style-name="LFO2" style:family="paragraph"/>
    <style:style style:name="P14" style:parent-style-name="NoSpacing" style:list-style-name="LFO2" style:family="paragraph"/>
    <style:style style:name="P15" style:parent-style-name="NoSpacing" style:list-style-name="LFO2" style:family="paragraph"/>
    <style:style style:name="P16" style:parent-style-name="NoSpacing" style:list-style-name="LFO2" style:family="paragraph"/>
    <style:style style:name="T17" style:parent-style-name="DefaultParagraphFont" style:family="text">
      <style:text-properties fo:language="en" fo:country="US"/>
    </style:style>
    <style:style style:name="P18" style:parent-style-name="NoSpacing" style:list-style-name="LFO3" style:family="paragraph"/>
    <style:style style:name="P19" style:parent-style-name="NoSpacing" style:list-style-name="LFO3" style:family="paragraph"/>
    <style:style style:name="P20" style:parent-style-name="NoSpacing" style:list-style-name="LFO3" style:family="paragraph"/>
    <style:style style:name="P21" style:parent-style-name="NoSpacing" style:family="paragraph">
      <style:text-properties fo:language="en" fo:country="US"/>
    </style:style>
    <style:style style:name="P22" style:parent-style-name="NoSpacing" style:family="paragraph">
      <style:text-properties fo:language="en" fo:country="US"/>
    </style:style>
    <style:style style:name="P23" style:parent-style-name="NoSpacing" style:list-style-name="LFO3" style:family="paragraph"/>
    <style:style style:name="T24" style:parent-style-name="DefaultParagraphFont" style:family="text">
      <style:text-properties fo:font-weight="bold" style:font-weight-asian="bold" style:font-weight-complex="bold" fo:background-color="#FFFF00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Spacing" style:family="paragraph">
      <style:text-properties fo:font-weight="bold" style:font-weight-asian="bold" style:font-weight-complex="bold"/>
    </style:style>
    <style:style style:name="P27" style:parent-style-name="NoSpacing" style:family="paragraph">
      <style:text-properties fo:font-weight="bold" style:font-weight-asian="bold" style:font-weight-complex="bold" fo:language="en" fo:country="US"/>
    </style:style>
  </office:automatic-styles>
  <office:body>
    <office:text text:use-soft-page-breaks="true">
      <text:p text:style-name="P1">Conduct unit testing of the entire code…..<text:s/><text:line-break/>installations wali shit : <text:s text:c="2"/>pytest, pytest-cov, pytest-asyncio, httpx, factory-boy and freezegun everything must be using the uv only<text:s/><text:line-break/></text:p>
      <text:p text:style-name="P2">Dependencies :<text:s/><text:line-break/><text:tab/>pytest.ini <text:s/>in the root location</text:p>
      <text:p text:style-name="P3"><text:tab/>[pytest]</text:p>
      <text:p text:style-name="P4">pythonpath = src,<text:s/>testpaths = tests,<text:s/>addopts = -ra -q --strict-markers</text:p>
      <text:p text:style-name="P5">markers =<text:s/>unit: fast isolated tests,<text:s/>integration: slower multi-module tests<text:s/></text:p>
      <text:p text:style-name="P6"/>
      <text:p text:style-name="P7">for every single<text:s/>service in the folder :<text:s/></text:p>
      <text:p text:style-name="P8"> <text:s/>test_routes.py → API behavior</text:p>
      <text:p text:style-name="P9"> <text:s/>test_service.py → business logic</text:p>
      <text:p text:style-name="NoSpacing"><text:span text:style-name="T10"><text:tab/></text:span><text:span text:style-name="T11"><text:tab/></text:span>integration/ → multi-module flows (rare, valuable)<text:s/></text:p>
      <text:p text:style-name="P12"/>
      <text:list text:style-name="LFO2" text:continue-numbering="true">
        <text:list-item>
          <text:p text:style-name="P13">status codes</text:p>
        </text:list-item>
        <text:list-item>
          <text:p text:style-name="P14">response shape</text:p>
        </text:list-item>
        <text:list-item>
          <text:p text:style-name="P15">auth requirements</text:p>
        </text:list-item>
        <text:list-item>
          <text:p text:style-name="P16">dependency wiring</text:p>
        </text:list-item>
      </text:list>
      <text:p text:style-name="NoSpacing"><text:span text:style-name="T17"><text:line-break/>make sure no changes in the main part of the code are made….</text:span></text:p>
      <text:list text:style-name="LFO3" text:continue-numbering="true">
        <text:list-item>
          <text:p text:style-name="P18">SMTP</text:p>
        </text:list-item>
        <text:list-item>
          <text:p text:style-name="P19">SMS</text:p>
        </text:list-item>
        <text:list-item>
          <text:p text:style-name="P20">3rd party APIs</text:p>
        </text:list-item>
      </text:list>
      <text:p text:style-name="NoSpacing"/>
      <text:p text:style-name="P21"/>
      <text:p text:style-name="P22"/>
      <text:list text:style-name="LFO3" text:continue-numbering="true">
        <text:list-item>
          <text:p text:style-name="P23"><text:span text:style-name="T24">uv run pytest tests/ -v</text:span><text:span text:style-name="T25"><text:s/>-&gt; to run it all</text:span></text:p>
        </text:list-item>
      </text:list>
      <text:p text:style-name="P26"/>
      <text:p text:style-name="P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Yash Dhadod</meta:initial-creator>
    <dc:creator>Yash Dhadod</dc:creator>
    <meta:creation-date>2026-02-05T12:36:00Z</meta:creation-date>
    <dc:date>2026-02-05T12:36:00Z</dc:date>
    <meta:template xlink:href="Normal" xlink:type="simple"/>
    <meta:editing-cycles>3</meta:editing-cycles>
    <meta:editing-duration>PT3360S</meta:editing-duration>
    <meta:document-statistic meta:page-count="1" meta:paragraph-count="20" meta:word-count="122" meta:character-count="731" meta:row-count="34" meta:non-whitespace-character-count="629"/>
  </office:meta>
</office:document-meta>
</file>