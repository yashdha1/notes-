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FF0000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</office:automatic-styles>
  <office:body>
    <office:text text:use-soft-page-breaks="true">
      <text:p text:style-name="P1">Backend and dev shit</text:p>
      <text:list text:style-name="LFO1" text:continue-numbering="true">
        <text:list-item>
          <text:p text:style-name="P2"><text:span text:style-name="T3">ORM</text:span><text:s/>-&gt; object relational mapping -&gt; software management lib or some kind of system to connect to some database using basic language syntax. Without knowing database queries. Eg. Mongoose, etc…</text:p>
        </text:list-item>
      </text:list>
      <text:p text:style-name="ListParagraph"/>
      <text:list text:style-name="LFO1" text:continue-numbering="true">
        <text:list-item>
          <text:p text:style-name="P4"><text:span text:style-name="T5">CMS</text:span><text:s/>-&gt;<text:s/>Content Management System (CMS) is a software platform that helps you create, manage, store, and deliver digital content (like text, images, videos) without needing to write code for every change.</text:p>
          <text:list text:continue-numbering="true">
            <text:list-item>
              <text:p text:style-name="P6">Content storage – saves content in databases (MySQL, PostgreSQL, MongoDB, etc.)</text:p>
            </text:list-item>
            <text:list-item>
              <text:p text:style-name="P7">Content creation &amp; editing – admin panels for adding/editing content.</text:p>
            </text:list-item>
            <text:list-item>
              <text:p text:style-name="P8">User authentication &amp; roles – admins, editors, authors.</text:p>
            </text:list-item>
            <text:list-item>
              <text:p text:style-name="P9">Content delivery – serves content via templates or APIs.</text:p>
            </text:list-item>
            <text:list-item>
              <text:p text:style-name="P10">Version control – tracks content changes.</text:p>
            </text:list-item>
            <text:list-item>
              <text:p text:style-name="P11">Security &amp; access control.</text:p>
            </text:list-item>
          </text:list>
        </text:list-item>
      </text:list>
      <text:p text:style-name="Normal"/>
      <text:list text:style-name="LFO1" text:continue-numbering="true">
        <text:list-item>
          <text:p text:style-name="P12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sh Dhadod</meta:initial-creator>
    <dc:creator>Yash Dhadod</dc:creator>
    <meta:creation-date>2026-01-17T18:20:00Z</meta:creation-date>
    <dc:date>2026-01-17T18:55:00Z</dc:date>
    <meta:template xlink:href="Normal" xlink:type="simple"/>
    <meta:editing-cycles>1</meta:editing-cycles>
    <meta:editing-duration>PT2100S</meta:editing-duration>
    <meta:document-statistic meta:page-count="1" meta:paragraph-count="32" meta:word-count="136" meta:character-count="721" meta:row-count="28" meta:non-whitespace-character-count="617"/>
  </office:meta>
</office:document-meta>
</file>